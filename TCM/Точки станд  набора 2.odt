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4.385cm"/>
    </style:style>
    <style:style style:name="Table1.B" style:family="table-column">
      <style:table-column-properties style:column-width="3.498cm"/>
    </style:style>
    <style:style style:name="Table1.C" style:family="table-column">
      <style:table-column-properties style:column-width="4.02cm"/>
    </style:style>
    <style:style style:name="Table1.D" style:family="table-column">
      <style:table-column-properties style:column-width="4.02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2" style:family="table-row">
      <style:table-row-properties style:min-row-height="0.977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background-color="#ffffff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ТОЧКИ</text:span></text:p>
            <text:p text:style-name="P2"><text:span text:style-name="T1">СТАНДАРТНОГО</text:span></text:p>
            <text:p text:style-name="P2"><text:span text:style-name="T1">НАБОРА</text:span></text:p>
          </table:table-cell>
          <table:table-cell table:style-name="Table1.A1" office:value-type="string">
            <text:p text:style-name="P1"><text:span text:style-name="T2">ЕЕ ДЕЙСТВИЕ</text:span></text:p>
          </table:table-cell>
          <table:table-cell table:style-name="Table1.A1" office:value-type="string">
            <text:p text:style-name="P1"><text:span text:style-name="T2">ВРЕМЯ МАССАЖА</text:span></text:p>
          </table:table-cell>
          <table:table-cell table:style-name="Table1.A1" office:value-type="string">
            <text:p text:style-name="P1"><text:span text:style-name="T1">ВРЕМЯ</text:span></text:p>
            <text:p text:style-name="P1"><text:span text:style-name="T1">ПРОГРЕВАНИЯ</text:span>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text:span text:style-name="T2">ТОНИЗИРУЮЩАЯ</text:span>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1"><text:span text:style-name="T2">СЕДАТИВНАЯ</text:span>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-20 мин</text:p>
          </table:table-cell>
        </table:table-row>
        <table:table-row table:style-name="Table1.1">
          <table:table-cell table:style-name="Table1.A1" office:value-type="string">
            <text:p text:style-name="P1"><text:span text:style-name="T2">ЛО-ПУНКТ</text:span>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1"><text:span text:style-name="T2">ПОСОБНИК</text:span>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 -20 мин</text:p>
          </table:table-cell>
        </table:table-row>
        <table:table-row table:style-name="Table1.1">
          <table:table-cell table:style-name="Table1.A1" office:value-type="string">
            <text:p text:style-name="P1"><text:span text:style-name="T1">ГРУППОВОЙ ЛО-</text:span></text:p>
            <text:p text:style-name="P1"><text:span text:style-name="T1">ПУНКТ</text:span>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1"><text:span text:style-name="T2">СИГНАЛЬНАЯ</text:span>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До 2 х мин или двух жжений</text:p>
          </table:table-cell>
        </table:table-row>
        <table:table-row table:style-name="Table1.1">
          <table:table-cell table:style-name="Table1.A1" office:value-type="string">
            <text:p text:style-name="P1"><text:span text:style-name="T2">ПРОТИВОБОЛЕВАЯ</text:span>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-20 мин</text:p>
          </table:table-cell>
          <table:table-cell table:style-name="Table1.A1" office:value-type="string">
            <text:p text:style-name="P1">15-20 ми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0-07T23:45:25</dc:date>
    <dc:creator>Олег Олег</dc:creator>
    <meta:generator>OpenOffice/4.1.7$Unix OpenOffice.org_project/417m1$Build-9800</meta:generator>
    <meta:editing-duration>P4DT3H7M33S</meta:editing-duration>
    <meta:editing-cycles>3</meta:editing-cycles>
    <meta:document-statistic meta:table-count="1" meta:image-count="0" meta:object-count="0" meta:page-count="1" meta:paragraph-count="36" meta:word-count="88" meta:character-count="427"/>
  </office:meta>
</office:document-meta>
</file>