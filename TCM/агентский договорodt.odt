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251cm" fo:margin-left="0.002cm" fo:margin-top="0cm" fo:margin-bottom="0cm" table:align="left" style:writing-mode="lr-tb"/>
    </style:style>
    <style:style style:name="Table1.A" style:family="table-column">
      <style:table-column-properties style:column-width="8.625cm"/>
    </style:style>
    <style:style style:name="Table1.B" style:family="table-column">
      <style:table-column-properties style:column-width="8.62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7.999cm" style:keep-together="true" fo:keep-together="auto"/>
    </style:style>
    <style:style style:name="Table2" style:family="table">
      <style:table-properties style:width="18.381cm" fo:margin-left="0.002cm" fo:margin-top="0cm" fo:margin-bottom="0cm" table:align="left" style:writing-mode="lr-tb"/>
    </style:style>
    <style:style style:name="Table2.A" style:family="table-column">
      <style:table-column-properties style:column-width="9.1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3" style:family="table">
      <style:table-properties style:width="17.251cm" fo:margin-left="0.002cm" fo:margin-top="0cm" fo:margin-bottom="0cm" table:align="left" style:writing-mode="lr-tb"/>
    </style:style>
    <style:style style:name="Table3.A" style:family="table-column">
      <style:table-column-properties style:column-width="8.625cm"/>
    </style:style>
    <style:style style:name="Table3.B" style:family="table-column">
      <style:table-column-properties style:column-width="8.62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2" style:family="table-row">
      <style:table-row-properties style:min-row-height="7.999cm" style:keep-together="true" fo:keep-together="auto"/>
    </style:style>
    <style:style style:name="P1" style:family="paragraph" style:parent-style-name="No_20_Spacing">
      <style:paragraph-properties fo:line-height="0.499cm"/>
      <style:text-properties fo:language="ru" fo:country="RU"/>
    </style:style>
    <style:style style:name="P2" style:family="paragraph" style:parent-style-name="No_20_Spacing">
      <style:paragraph-properties fo:line-height="0.499cm" fo:text-align="justify" style:justify-single-word="false"/>
      <style:text-properties fo:language="ru" fo:country="RU"/>
    </style:style>
    <style:style style:name="P3" style:family="paragraph" style:parent-style-name="No_20_Spacing">
      <style:paragraph-properties fo:line-height="0.499cm" fo:text-align="justify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No_20_Spacing">
      <style:paragraph-properties fo:margin-left="0cm" fo:margin-right="0cm" fo:line-height="0.6cm" fo:text-align="justify" style:justify-single-word="false" fo:text-indent="0.501cm" style:auto-text-indent="false"/>
      <style:text-properties fo:language="ru" fo:country="RU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paragraph-properties fo:line-height="0.499cm"/>
      <style:text-properties fo:language="ru" fo:country="RU" style:font-name-asian="Times New Roman1"/>
    </style:style>
    <style:style style:name="P7" style:family="paragraph" style:parent-style-name="Standard">
      <style:paragraph-properties fo:text-align="center" style:justify-single-word="false"/>
      <style:text-properties fo:language="ru" fo:country="RU"/>
    </style:style>
    <style:style style:name="P8" style:family="paragraph" style:parent-style-name="Standard">
      <style:paragraph-properties fo:text-align="center" style:justify-single-word="false">
        <style:tab-stops>
          <style:tab-stop style:position="10.252cm"/>
        </style:tab-stops>
      </style:paragraph-properties>
      <style:text-properties fo:language="ru" fo:country="RU"/>
    </style:style>
    <style:style style:name="P9" style:family="paragraph" style:parent-style-name="Standard">
      <style:paragraph-properties fo:line-height="0.499cm"/>
      <style:text-properties fo:language="ru" fo:country="RU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0.252cm"/>
        </style:tab-stops>
      </style:paragraph-properties>
      <style:text-properties fo:language="ru" fo:country="RU"/>
    </style:style>
    <style:style style:name="P11" style:family="paragraph" style:parent-style-name="Standard">
      <style:text-properties fo:color="#000000" fo:language="ru" fo:country="RU" style:language-asian="ru" style:country-asian="RU"/>
    </style:style>
    <style:style style:name="P12" style:family="paragraph" style:parent-style-name="По_20_умолчанию">
      <style:paragraph-properties fo:margin-top="0cm" fo:margin-bottom="0cm" fo:line-height="0.499cm" fo:text-align="center" style:justify-single-word="false"/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P13" style:family="paragraph" style:parent-style-name="По_20_умолчанию">
      <style:paragraph-properties fo:margin-top="0cm" fo:margin-bottom="0cm" fo:line-height="0.499cm" fo:text-align="justify" style:justify-single-word="false"/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P14" style:family="paragraph" style:parent-style-name="По_20_умолчанию">
      <style:paragraph-properties fo:margin-top="0cm" fo:margin-bottom="0cm" fo:line-height="0.499cm" fo:text-align="justify" style:justify-single-word="false"/>
      <style:text-properties style:font-name="Times New Roman" fo:language="ru" fo:country="RU" fo:font-weight="bold" style:font-weight-asian="bold" style:font-name-complex="Times New Roman1" style:font-weight-complex="bold"/>
    </style:style>
    <style:style style:name="P15" style:family="paragraph" style:parent-style-name="По_20_умолчанию">
      <style:paragraph-properties fo:margin-top="0cm" fo:margin-bottom="0cm" fo:line-height="0.6cm" fo:text-align="center" style:justify-single-word="false"/>
      <style:text-properties style:font-name="Times New Roman" fo:language="ru" fo:country="RU" fo:font-weight="bold" style:font-weight-asian="bold" style:font-name-complex="Times New Roman1" style:font-weight-complex="bold"/>
    </style:style>
    <style:style style:name="P16" style:family="paragraph" style:parent-style-name="По_20_умолчанию">
      <style:paragraph-properties fo:margin-top="0cm" fo:margin-bottom="0cm" fo:line-height="0.499cm"/>
      <style:text-properties style:font-name="Times New Roman" fo:language="ru" fo:country="RU" style:font-name-complex="Times New Roman1"/>
    </style:style>
    <style:style style:name="P17" style:family="paragraph" style:parent-style-name="По_20_умолчанию">
      <style:paragraph-properties fo:margin-top="0cm" fo:margin-bottom="0cm" fo:line-height="0.499cm" fo:text-align="justify" style:justify-single-word="false"/>
      <style:text-properties style:font-name="Times New Roman" fo:language="ru" fo:country="RU" style:font-name-complex="Times New Roman1"/>
    </style:style>
    <style:style style:name="P18" style:family="paragraph" style:parent-style-name="По_20_умолчанию">
      <style:paragraph-properties fo:margin-top="0cm" fo:margin-bottom="0cm" fo:line-height="0.499cm" fo:text-align="justify" style:justify-single-word="false"/>
      <style:text-properties fo:language="ru" fo:country="RU"/>
    </style:style>
    <style:style style:name="P19" style:family="paragraph" style:parent-style-name="По_20_умолчанию">
      <style:paragraph-properties fo:margin-top="0cm" fo:margin-bottom="0cm" fo:line-height="0.499cm" fo:text-align="end" style:justify-single-word="false"/>
      <style:text-properties fo:language="ru" fo:country="RU"/>
    </style:style>
    <style:style style:name="P20" style:family="paragraph" style:parent-style-name="По_20_умолчанию">
      <style:paragraph-properties fo:margin-top="0cm" fo:margin-bottom="0cm" fo:line-height="0.499cm" fo:text-align="center" style:justify-single-word="false"/>
      <style:text-properties fo:language="ru" fo:country="RU"/>
    </style:style>
    <style:style style:name="P21" style:family="paragraph" style:parent-style-name="По_20_умолчанию">
      <style:paragraph-properties fo:margin-top="0cm" fo:margin-bottom="0cm" fo:line-height="0.6cm" fo:text-align="center" style:justify-single-word="false"/>
      <style:text-properties fo:language="ru" fo:country="RU"/>
    </style:style>
    <style:style style:name="P22" style:family="paragraph" style:parent-style-name="По_20_умолчанию">
      <style:paragraph-properties fo:margin-top="0cm" fo:margin-bottom="0cm" fo:line-height="0.6cm" fo:text-align="justify" style:justify-single-word="false"/>
      <style:text-properties fo:language="ru" fo:country="RU"/>
    </style:style>
    <style:style style:name="P23" style:family="paragraph" style:parent-style-name="По_20_умолчанию">
      <style:paragraph-properties fo:margin-top="0cm" fo:margin-bottom="0cm" fo:line-height="0.499cm" fo:text-align="justify" style:justify-single-word="false" fo:break-before="page"/>
      <style:text-properties style:font-name="Times New Roman" fo:language="ru" fo:country="RU" style:font-name-complex="Times New Roman1"/>
    </style:style>
    <style:style style:name="P24" style:family="paragraph" style:parent-style-name="По_20_умолчанию" style:master-page-name="Standard">
      <style:paragraph-properties fo:margin-top="0cm" fo:margin-bottom="0cm" fo:line-height="0.499cm" fo:text-align="center" style:justify-single-word="false" style:page-number="auto"/>
      <style:text-properties fo:language="ru" fo:country="RU"/>
    </style:style>
    <style:style style:name="P25" style:family="paragraph" style:parent-style-name="По_20_умолчанию">
      <style:paragraph-properties fo:margin-left="0cm" fo:margin-right="0cm" fo:margin-top="0cm" fo:margin-bottom="0cm" fo:line-height="0.499cm" fo:text-indent="0.499cm" style:auto-text-indent="false"/>
      <style:text-properties style:font-name="Times New Roman" fo:language="ru" fo:country="RU" style:font-name-complex="Times New Roman1"/>
    </style:style>
    <style:style style:name="P26" style:family="paragraph" style:parent-style-name="По_20_умолчанию">
      <style:paragraph-properties fo:margin-left="0cm" fo:margin-right="0cm" fo:margin-top="0cm" fo:margin-bottom="0cm" fo:line-height="0.6cm" fo:text-align="justify" style:justify-single-word="false" fo:text-indent="0.499cm" style:auto-text-indent="false"/>
      <style:text-properties fo:language="ru" fo:country="RU"/>
    </style:style>
    <style:style style:name="P27" style:family="paragraph" style:parent-style-name="По_20_умолчанию" style:list-style-name="WWNum2">
      <style:paragraph-properties fo:margin-left="0cm" fo:margin-right="0cm" fo:margin-top="0cm" fo:margin-bottom="0cm" fo:line-height="0.499cm" fo:text-indent="0.499cm" style:auto-text-indent="false"/>
      <style:text-properties fo:language="ru" fo:country="RU"/>
    </style:style>
    <style:style style:name="P28" style:family="paragraph" style:parent-style-name="Footer1">
      <style:text-properties fo:language="ru" fo:country="RU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language="it" fo:country="IT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-asian="Times New Roman1"/>
    </style:style>
    <style:style style:name="T7" style:family="text">
      <style:text-properties style:font-name-asian="Times New Roman1" style:language-asian="ru" style:country-asian="RU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language="ru" fo:country="RU"/>
    </style:style>
    <style:style style:name="T12" style:family="text">
      <style:text-properties fo:language="ru" fo:country="RU"/>
    </style:style>
    <style:style style:name="T13" style:family="text">
      <style:text-properties fo:language="ru" fo:country="RU" style:font-name-asian="Times New Roman1"/>
    </style:style>
    <style:style style:name="T14" style:family="text">
      <style:text-properties fo:language="ru" fo:country="RU" style:font-name-asian="Times New Roman1" style:language-asian="ru" style:country-asian="RU"/>
    </style:style>
    <style:style style:name="T15" style:family="text">
      <style:text-properties fo:language="ru" fo:country="RU" fo:font-weight="bold" style:font-weight-asian="bold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color="#ff0000" style:font-name="Times New Roman" style:font-name-asian="Times New Roman1" style:font-name-complex="Times New Roman1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/>
    </style:style>
    <style:style style:name="T20" style:family="text">
      <style:text-properties fo:font-size="10pt" fo:language="ru" fo:country="RU" fo:font-weight="bold" style:font-size-asian="10pt" style:font-weight-asian="bold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2">Агентский договор № _________ <text:s/>возмездного оказания услуг </text:span></text:p>
      <text:p text:style-name="P12"/>
      <text:p text:style-name="P12"/>
      <text:p text:style-name="P14"/>
      <text:p text:style-name="P18"><text:span text:style-name="T2">Санкт-Петербург <text:s text:c="83"/>«___</text:span><text:span text:style-name="T2">» </text:span><text:span text:style-name="T2">____________ 2025 г.</text:span></text:p>
      <text:p text:style-name="P17"/>
      <text:p text:style-name="P17"/>
      <text:p text:style-name="P4"><text:span text:style-name="T10">Общество с ограниченной ответственностью «КВ7», именуемое в дальнейшем «Принципал», в лице генерального директора - Вальчука Александра Александровича, действующего на основании Устава, с одной стороны,</text:span> <text:span text:style-name="T6">и гражданин(ка) Российской Федерации </text:span></text:p>
      <text:p text:style-name="P26"><text:span text:style-name="T1">_______________________________________________ _____________________________ , паспорт: серия ______ №__________, именуемый(ая) в дальнейшем «Агент», с другой стороны, совместно именуемые «Стороны», заключили настоящий Договор о нижеследующем:</text:span></text:p>
      <text:p text:style-name="P21"><text:span text:style-name="T2">1. Предмет договора</text:span></text:p>
      <text:p text:style-name="P22"><text:span text:style-name="T1">1.1. Принципал поручает, а Агент обязуется совершать от имени и за вознаграждение Принципала действия по привлечению клиентов, продвижению и реализации продукции Принципала.<text:line-break/>1.2. Агент действует самостоятельно, на свой риск и по своему усмотрению, не являясь штатным работником Принципала.</text:span></text:p>
      <text:p text:style-name="P22"><text:span text:style-name="T1">1.3. Агент самостоятельно определяет время, место и способы своей деятельности, руководствуясь только условиями настоящего договора и задачами по привлечению клиентов.<text:line-break/>1.4. Агент не обязан выполнять задания в каждый календарный месяц. При отсутствии сделок или продаж вознаграждение не начисляется и не выплачивается.</text:span></text:p>
      <text:p text:style-name="P21"><text:span text:style-name="T2">2. Вознаграждение агента</text:span></text:p>
      <text:p text:style-name="P22"><text:span text:style-name="T1">2.1. Размер и порядок расчёта вознаграждения определяются в Приложении №1 к настоящему договору.</text:span></text:p>
      <text:p text:style-name="P22"><text:span text:style-name="T1">2.2. Вознаграждение выплачивается только при наличии подтверждённого результата — совершения сделки, оплаты клиентом, или иного действия, зафиксированного отчётом агента и признанного Принципалом.</text:span></text:p>
      <text:p text:style-name="P22"><text:span text:style-name="T1">2.3. Принципал удерживает и уплачивает налоги в соответствии с действующим законодательством РФ (если Агент не является самозанятым, о чем он обязан уведомить Принципала в письменной форме, в соответствии с требованиями действующего законодательства).</text:span></text:p>
      <text:p text:style-name="P22"><text:span text:style-name="T1">2.4. В случае регистрации Агента в качестве самозанятого, Принципал оплачивает услуги в полном размере на основании чека, сформированного в приложении «Мой налог». В этом случае налог удерживается Агентом самостоятельно. </text:span><text:span text:style-name="T17"><text:s/></text:span></text:p>
      <text:p text:style-name="P21"><text:span text:style-name="T2">3. Права и обязанности сторон</text:span></text:p>
      <text:p text:style-name="P22"><text:span text:style-name="T2">Агент имеет право:</text:span></text:p>
      <text:p text:style-name="P22"><text:span text:style-name="T1">• самостоятельно выбирать клиентов и методы продвижения;</text:span></text:p>
      <text:p text:style-name="P22"><text:span text:style-name="T1">• получать вознаграждение в соответствии с достигнутыми результатами;</text:span></text:p>
      <text:p text:style-name="P22"><text:span text:style-name="T1">• не выполнять действия, если не желает, без каких-либо штрафов или обязательств.</text:span></text:p>
      <text:p text:style-name="P22"><text:span text:style-name="T2">Агент обязуется:</text:span></text:p>
      <text:p text:style-name="P22"><text:span text:style-name="T1">• предоставлять достоверные отчёты о совершённых действиях;</text:span></text:p>
      <text:p text:style-name="P22"><text:span text:style-name="T1">• соблюдать коммерческую тайну;</text:span></text:p>
      <text:p text:style-name="P22"><text:span text:style-name="T1">• использовать только утверждённые материалы Принципала.</text:span></text:p>
      <text:p text:style-name="P22"><text:span text:style-name="T2">Принципал обязуется:</text:span></text:p>
      <text:p text:style-name="P22"><text:soft-page-break/><text:span text:style-name="T1">• своевременно выплачивать вознаграждение за подтверждённые результаты;</text:span></text:p>
      <text:p text:style-name="P22"><text:span text:style-name="T1">• предоставлять Агенту материалы и информацию, необходимые для продвижения.</text:span></text:p>
      <text:p text:style-name="P21"><text:span text:style-name="T2">4. Гарантии и ответственность</text:span></text:p>
      <text:p text:style-name="P22"><text:span text:style-name="T1">4.1. Стороны подтверждают, что настоящий договор не является трудовым, а отношения сторон не регулируются Трудовым кодексом РФ.</text:span></text:p>
      <text:p text:style-name="P22"><text:span text:style-name="T1">4.2. Принципал не выплачивает минимальную заработную плату (МРОТ) и иные гарантированные выплаты, так как Агент получает вознаграждение только по факту результата.<text:line-break/>4.3. Агент несёт ответственность за достоверность предоставляемой информации и сохранность данных Принципала.</text:span></text:p>
      <text:p text:style-name="P21"><text:span text:style-name="T2">5. Срок действия договора</text:span></text:p>
      <text:p text:style-name="P22"><text:span text:style-name="T1">5.1. Настоящий договор вступает в силу с момента его подписания и действует 11 месяцев.<text:line-break/>5.2. Любая из сторон может расторгнуть договор, уведомив другую сторону не позднее чем за 10 календарных дней до предполагаемой даты расторжения.</text:span></text:p>
      <text:p text:style-name="P21"><text:span text:style-name="T2">6. Прочие условия</text:span></text:p>
      <text:p text:style-name="P22"><text:span text:style-name="T1">6.1. Все споры и разногласия разрешаются путём переговоров, а при невозможности — в суде по месту нахождения Принципала.</text:span></text:p>
      <text:p text:style-name="P22"><text:span text:style-name="T1">6.2. Договор может быть заключён в электронной форме (в том числе через электронную почту или мессенджеры).</text:span></text:p>
      <text:p text:style-name="P22"><text:span text:style-name="T1">6.3. Настоящий договор является достаточным основанием для учёта расходов Принципала и подтверждения доходов Агента.</text:span></text:p>
      <text:p text:style-name="P21"><text:span text:style-name="T2">7. Реквизиты сторон</text:span>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8">ПРИНЦИПАЛ: ООО «</text:span><text:span text:style-name="T8">КВ7</text:span><text:span text:style-name="T8">»</text:span></text:p>
          </table:table-cell>
          <table:table-cell table:style-name="Table1.A1" office:value-type="string">
            <text:p text:style-name="P2"><text:span text:style-name="T8">АГЕНТ: </text:span></text:p>
            <text:p text:style-name="P3"/>
          </table:table-cell>
        </table:table-row>
        <table:table-row table:style-name="Table1.2">
          <table:table-cell table:style-name="Table1.A1" office:value-type="string">
            <text:p text:style-name="P1">Юридический адрес: 192012, Санкт-Петербург, пр-кт Обуховской Обороны, д. 116, к. 1, литера Е, помещ. 21Н, ком. 619а</text:p>
            <text:p text:style-name="P6"/>
            <text:p text:style-name="P1">ИНН: 7805762036; КПП: 781101001</text:p>
            <text:p text:style-name="P1">ОГРН:1207800010890</text:p>
            <text:p text:style-name="P1"/>
            <text:p text:style-name="P1">Расчетный счет: 40702810832060017026</text:p>
            <text:p text:style-name="P1">БИК: 044030786 </text:p>
            <text:p text:style-name="P1">Корр. счет: 30101810600000000786</text:p>
            <text:p text:style-name="P1"/>
            <text:p text:style-name="P1">Генеральный директор: </text:p>
            <text:p text:style-name="P1"/>
            <text:p text:style-name="P1">________________________/ Вальчук А.А./</text:p>
          </table:table-cell>
          <table:table-cell table:style-name="Table1.A1" office:value-type="string">
            <text:p text:style-name="P2">Адрес: ________________________________</text:p>
            <text:p text:style-name="P2">______________________________________;</text:p>
            <text:p text:style-name="P2"/>
            <text:p text:style-name="P9">паспорт РФ: серия <text:s/>_____, <text:s/>номер_________;</text:p>
            <text:p text:style-name="P2">выдан: ___ ___ _____ года, _____________ ______________________________________, </text:p>
            <text:p text:style-name="P2">код подразделения: ______-______.</text:p>
            <text:p text:style-name="P9">ИНН: ___________________;</text:p>
            <text:p text:style-name="P9">Расчетный счет: ________________________</text:p>
            <text:p text:style-name="P9">______________________________________</text:p>
            <text:p text:style-name="P9">______________________________________</text:p>
            <text:p text:style-name="P9">______________________________________.</text:p>
            <text:p text:style-name="P9"/>
            <text:p text:style-name="P9">___________________ / _________________/.</text:p>
          </table:table-cell>
        </table:table-row>
      </table:table>
      <text:p text:style-name="P17"/>
      <text:p text:style-name="P17"/>
      <text:p text:style-name="P17"/>
      <text:p text:style-name="P11"/>
      <text:p text:style-name="P23"/>
      <text:p text:style-name="P13"/>
      <text:p text:style-name="P19"><text:span text:style-name="T1"><text:s/></text:span><text:span text:style-name="T2">Приложение №1</text:span></text:p>
      <text:p text:style-name="P19"><text:span text:style-name="T2">к Агентскому договору № _________ </text:span></text:p>
      <text:p text:style-name="P19"><text:span text:style-name="T2">возмездного оказания услуг </text:span></text:p>
      <text:p text:style-name="P19"><text:span text:style-name="T2">от ___.___.20___ г.</text:span></text:p>
      <text:p text:style-name="P19"><text:span text:style-name="T2"><text:s/></text:span></text:p>
      <text:p text:style-name="P20"><text:span text:style-name="T2">Расчёт вознаграждения</text:span></text:p>
      <text:p text:style-name="P17"/>
      <text:list xml:id="list8841872512160022690" text:style-name="WWNum2">
        <text:list-item>
          <text:p text:style-name="P27"><text:span text:style-name="T1">Вознаграждение Агента составляет соответствующий процент от суммы фактически оплаченных клиентами заказов в течение календарного месяца, привлечённых Агентом, по следующей системе:</text:span></text:p>
        </text:list-item>
      </text:list>
      <text:p text:style-name="P7">Система вознаграждения Агента по <text:span text:style-name="T7">Договору №________ от </text:span><text:span text:style-name="T10">__.__.20__ г. </text:span></text:p>
      <text:p text:style-name="P7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0"><text:span text:style-name="T19">Нижестоящий уровень покупателя</text:span></text:p>
          </table:table-cell>
          <table:table-cell table:style-name="Table2.A1" office:value-type="string">
            <text:p text:style-name="P10"><text:span text:style-name="T19">% начисляемый от покупок нижестоящего покупателя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8">1 уровень покупателя</text:span></text:p>
          </table:table-cell>
          <table:table-cell table:style-name="Table2.A1" office:value-type="string">
            <text:p text:style-name="P8"><text:span text:style-name="T18">1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8">2 уровень покупателя</text:span></text:p>
          </table:table-cell>
          <table:table-cell table:style-name="Table2.A1" office:value-type="string">
            <text:p text:style-name="P8"><text:span text:style-name="T18">2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8">3 уровень покупателя</text:span></text:p>
          </table:table-cell>
          <table:table-cell table:style-name="Table2.A1" office:value-type="string">
            <text:p text:style-name="P8"><text:span text:style-name="T18">3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8">4 уровень покупателя</text:span></text:p>
          </table:table-cell>
          <table:table-cell table:style-name="Table2.A1" office:value-type="string">
            <text:p text:style-name="P8"><text:span text:style-name="T18">4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8">5 уровень покупателя</text:span></text:p>
          </table:table-cell>
          <table:table-cell table:style-name="Table2.A1" office:value-type="string">
            <text:p text:style-name="P8"><text:span text:style-name="T18">5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8">6 уровень покупателя</text:span></text:p>
          </table:table-cell>
          <table:table-cell table:style-name="Table2.A1" office:value-type="string">
            <text:p text:style-name="P8"><text:span text:style-name="T18">6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8">7 уровень покупателя</text:span></text:p>
          </table:table-cell>
          <table:table-cell table:style-name="Table2.A1" office:value-type="string">
            <text:p text:style-name="P8"><text:span text:style-name="T18">7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8">8 уровень покупателя</text:span></text:p>
          </table:table-cell>
          <table:table-cell table:style-name="Table2.A1" office:value-type="string">
            <text:p text:style-name="P8"><text:span text:style-name="T18">8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8">9 <text:s/>уровень покупателя</text:span></text:p>
          </table:table-cell>
          <table:table-cell table:style-name="Table2.A1" office:value-type="string">
            <text:p text:style-name="P8"><text:span text:style-name="T18">9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8">10 <text:s/>уровень покупателя</text:span></text:p>
          </table:table-cell>
          <table:table-cell table:style-name="Table2.A1" office:value-type="string">
            <text:p text:style-name="P8"><text:span text:style-name="T18">10</text:span></text:p>
          </table:table-cell>
        </table:table-row>
      </table:table>
      <text:p text:style-name="P10"/>
      <text:p text:style-name="P10">Бонусы выплачиваются при условии выполнения обязательной закупки за месяц 3000 руб и выполнения требований по объему в соответствии с маркетинг планом</text:p>
      <text:p text:style-name="P16"/>
      <text:list xml:id="list482332756" text:continue-numbering="true" text:style-name="WWNum2">
        <text:list-item>
          <text:p text:style-name="P27"><text:span text:style-name="T1">Отчёт Агента предоставляется ежемесячно до 10 числа следующего месяца.</text:span></text:p>
        </text:list-item>
        <text:list-item>
          <text:p text:style-name="P27"><text:span text:style-name="T1">Оплата производится в течение календарного месяца, следующего за отчетным. после утверждения отчёта, на р/с указанный в разделе 7 настоящего договора</text:span></text:p>
        </text:list-item>
        <text:list-item>
          <text:p text:style-name="P27"><text:span text:style-name="T1">Если за отчётный месяц сделок нет — вознаграждение не начисляется.</text:span></text:p>
        </text:list-item>
      </text:list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text:span text:style-name="T8">ПРИНЦИПАЛ: ООО «КВ7</text:span><text:span text:style-name="T8">»</text:span></text:p>
          </table:table-cell>
          <table:table-cell table:style-name="Table3.A1" office:value-type="string">
            <text:p text:style-name="P2"><text:span text:style-name="T8">АГЕНТ: </text:span></text:p>
          </table:table-cell>
        </table:table-row>
        <table:table-row table:style-name="Table3.2">
          <table:table-cell table:style-name="Table3.A1" office:value-type="string">
            <text:p text:style-name="P1">Юридический адрес: 192012, Санкт-92012, Санкт-Петербург, пр-кт Обуховской Обороны, д. 116, к. 1, литера Е, помещ. 21Н, ком. 619а</text:p>
            <text:p text:style-name="P6"/>
            <text:p text:style-name="P1">ИНН: 7805762036; КПП: 781101001</text:p>
            <text:p text:style-name="P1">ОГРН:1207800010890</text:p>
            <text:p text:style-name="P1"/>
            <text:p text:style-name="P1">Расчетный счет: 40702810832060017026</text:p>
            <text:p text:style-name="P1">БИК: 044030786 </text:p>
            <text:p text:style-name="P1">Корр. счет: 30101810600000000786</text:p>
            <text:p text:style-name="P1">Генеральный директор: </text:p>
            <text:p text:style-name="P1"/>
            <text:p text:style-name="P1">________________________/ Вальчук А.А./</text:p>
          </table:table-cell>
          <table:table-cell table:style-name="Table3.A1" office:value-type="string">
            <text:p text:style-name="P2">Адрес: ________________________________ </text:p>
            <text:p text:style-name="P2">______________________________________;</text:p>
            <text:p text:style-name="P2"/>
            <text:p text:style-name="P9">паспорт РФ: серия <text:s/>_____, номер__________;</text:p>
            <text:p text:style-name="P2">выдан: ___ ___ _____ года, ____________ ______________________________________, </text:p>
            <text:p text:style-name="P2">код подразделения: ______-______.</text:p>
            <text:p text:style-name="P9">ИНН: ___________________;</text:p>
            <text:p text:style-name="P9">Расчетный счет: ________________________ </text:p>
            <text:p text:style-name="P9">______________________________________ </text:p>
            <text:p text:style-name="P9">______________________________________ </text:p>
            <text:p text:style-name="P9">______________________________________.</text:p>
            <text:p text:style-name="P9"/>
            <text:p text:style-name="P9"/>
            <text:p text:style-name="P9">__________________ / ________________/_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ru" fo:country="RU" style:font-name-asian="Arial Unicode MS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default-outline-level="" style:list-style-name="" style:class="extra">
      <style:paragraph-properties fo:margin-top="0.212cm" fo:margin-bottom="0.353cm" text:number-lines="false" text:line-number="0"/>
      <style:text-properties fo:color="#1f497d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079bf" style:font-name="Arial1" fo:font-size="20pt" style:font-name-asian="Arial2" style:font-size-asian="20pt" style:font-name-complex="Arial2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079bf" style:font-name="Arial1" fo:font-size="16pt" style:font-name-asian="Arial2" style:font-size-asian="16pt" style:font-name-complex="Arial2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079bf" style:font-name="Arial1" fo:font-size="14pt" style:font-name-asian="Arial2" style:font-size-asian="14pt" style:font-name-complex="Arial2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079bf" style:font-name="Arial1" fo:font-style="italic" style:font-name-asian="Arial2" style:font-style-asian="italic" style:font-name-complex="Arial2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079bf" style:font-name="Arial1" style:font-name-asian="Arial2" style:font-name-complex="Arial2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style:font-name="Arial1" fo:font-style="italic" style:font-name-asian="Arial2" style:font-style-asian="italic" style:font-name-complex="Arial2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="Arial1" style:font-name-asian="Arial2" style:font-name-complex="Arial2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keep-together="always" fo:keep-with-next="always"/>
      <style:text-properties fo:color="#272727" style:font-name="Arial1" fo:font-style="italic" style:font-name-asian="Arial2" style:font-style-asian="italic" style:font-name-complex="Arial2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keep-together="always" fo:keep-with-next="always"/>
      <style:text-properties fo:color="#272727" style:font-name="Arial1" fo:font-style="italic" style:font-name-asian="Arial2" style:font-style-asian="italic" style:font-name-complex="Arial2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text-align="start" style:justify-single-word="false"/>
      <style:text-properties style:font-name="Arial1" fo:font-size="28pt" fo:letter-spacing="-0.018cm" fo:font-weight="bold" style:font-name-asian="Arial2" style:font-size-asian="28pt" style:font-weight-asian="bold" style:font-name-complex="Arial2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cm" fo:text-align="center" style:justify-single-word="false"/>
      <style:text-properties fo:font-size="10pt" fo:font-style="italic" style:font-size-asian="10pt" style:font-style-asian="italic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079bf" fo:border-bottom="0.018cm solid #0079bf"/>
      <style:text-properties fo:font-size="10pt" fo:font-style="italic" style:font-size-asian="10pt" style:font-style-asian="italic" style:font-size-complex="10pt"/>
    </style:style>
    <style:style style:name="No_20_Spacing" style:display-name="No Spacing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text-properties fo:font-size="9pt" style:font-size-asian="9pt" style:font-size-complex="10pt"/>
    </style:style>
    <style:style style:name="endnote_20_text" style:display-name="end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4cm" fo:margin-right="0cm" fo:margin-top="0cm" fo:margin-bottom="0.176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552cm" fo:margin-right="0cm" fo:margin-top="0cm" fo:margin-bottom="0.176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94cm" fo:margin-right="0cm" fo:margin-top="0cm" fo:margin-bottom="0.176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328cm" fo:margin-right="0cm" fo:margin-top="0cm" fo:margin-bottom="0.176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716cm" fo:margin-right="0cm" fo:margin-top="0cm" fo:margin-bottom="0.176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104cm" fo:margin-right="0cm" fo:margin-top="0cm" fo:margin-bottom="0.176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orphans="2" fo:widows="2" text:number-lines="false" text:line-number="0" style:writing-mode="lr-tb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able_20_of_20_figures" style:display-name="table of figures" style:family="paragraph" style:parent-style-name="Standard" style:default-outline-level="" style:list-style-name=""/>
    <style:style style:name="Название" style:family="paragraph" style:parent-style-name="Standard" style:default-outline-level="" style:list-style-name="">
      <style:paragraph-properties fo:margin-top="0cm" fo:margin-bottom="0.141cm"/>
      <style:text-properties style:font-name="Arial1" fo:font-size="28pt" fo:letter-spacing="-0.018cm" style:font-name-asian="Arial2" style:font-size-asian="28pt" style:font-name-complex="Arial2" style:font-size-complex="28pt"/>
    </style:style>
    <style:style style:name="Header1" style:family="paragraph" style:parent-style-name="Standard" style:default-outline-level="" style:list-style-name="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1" style:family="paragraph" style:parent-style-name="Standard" style:default-outline-level="" style:list-style-name="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aption1" style:family="paragraph" style:parent-style-name="Standard" style:default-outline-level="" style:list-style-name="">
      <style:paragraph-properties fo:margin-top="0cm" fo:margin-bottom="0.353cm"/>
      <style:text-properties fo:color="#5e5e5e" fo:font-size="9pt" fo:font-style="italic" style:font-size-asian="9pt" style:font-style-asian="italic" style:font-size-complex="9pt" style:font-style-complex="italic"/>
    </style:style>
    <style:style style:name="По_20_умолчанию" style:display-name="По умолчанию" style:family="paragraph" style:default-outline-level="" style:list-style-name="">
      <style:paragraph-properties fo:margin-top="0.282cm" fo:margin-bottom="0cm" fo:line-height="120%" fo:orphans="2" fo:widows="2" style:writing-mode="lr-tb"/>
      <style:text-properties fo:color="#000000" style:font-name="Helvetica Neue" fo:font-size="12pt" style:font-size-asian="12pt" style:font-name-complex="Arial Unicode MS" style:font-size-complex="12pt"/>
    </style:style>
    <style:style style:name="Default_20_Paragraph_20_Font" style:display-name="Default Paragraph Font" style:family="text"/>
    <style:style style:name="Intense_20_Emphasis" style:display-name="Intense Emphasis" style:family="text">
      <style:text-properties fo:color="#0079bf" fo:font-style="italic" style:font-style-asian="italic" style:font-style-complex="italic"/>
    </style:style>
    <style:style style:name="Intense_20_Reference" style:display-name="Intense Reference" style:family="text">
      <style:text-properties fo:font-variant="small-caps" fo:color="#0079bf" fo:letter-spacing="0.009cm" fo:font-weight="bold" style:font-weight-asian="bold" style:font-weight-complex="bold"/>
    </style:style>
    <style:style style:name="Subtle_20_Emphasis" style:display-name="Subtle Emphasis" style:family="text">
      <style:text-properties fo:color="#404040"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5a5a5a"/>
    </style:style>
    <style:style style:name="Book_20_Title" style:display-name="Book Title" style:family="tex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ff00ff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Liberation Sans" fo:font-size="20pt" style:font-name-asian="Liberation Sans1" style:font-size-asian="20pt" style:font-name-complex="Liberation Sans1" style:font-size-complex="20pt"/>
    </style:style>
    <style:style style:name="Heading_20_2_20_Char" style:display-name="Heading 2 Char" style:family="text">
      <style:text-properties style:font-name="Liberation Sans" fo:font-size="17pt" style:font-name-asian="Liberation Sans1" style:font-size-asian="17pt" style:font-name-complex="Liberation Sans1"/>
    </style:style>
    <style:style style:name="Heading_20_3_20_Char" style:display-name="Heading 3 Char" style:family="text">
      <style:text-properties style:font-name="Liberation Sans" fo:font-size="15pt" style:font-name-asian="Liberation Sans1" style:font-size-asian="15pt" style:font-name-complex="Liberation Sans1" style:font-size-complex="15pt"/>
    </style:style>
    <style:style style:name="Heading_20_4_20_Char" style:display-name="Heading 4 Char" style:family="text">
      <style:text-properties style:font-name="Liberation Sans" fo:font-size="13pt" fo:font-weight="bold" style:font-name-asian="Liberation Sans1" style:font-size-asian="13pt" style:font-weight-asian="bold" style:font-name-complex="Liberation Sans1" style:font-size-complex="13pt" style:font-weight-complex="bold"/>
    </style:style>
    <style:style style:name="Heading_20_5_20_Char" style:display-name="Heading 5 Char" style:family="text">
      <style:text-properties style:font-name="Liberation Sans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Heading_20_6_20_Char" style:display-name="Heading 6 Char" style:family="text">
      <style:text-properties style:font-name="Liberation Sans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Heading_20_7_20_Char" style:display-name="Heading 7 Char" style:family="text">
      <style:text-properties style:font-name="Liberation Sans" fo:font-size="11pt" fo:font-style="italic" fo:font-weight="bold" style:font-name-asian="Liberation Sans1" style:font-size-asian="11pt" style:font-style-asian="italic" style:font-weight-asian="bold" style:font-name-complex="Liberation Sans1" style:font-size-complex="11pt" style:font-style-complex="italic" style:font-weight-complex="bold"/>
    </style:style>
    <style:style style:name="Heading_20_8_20_Char" style:display-name="Heading 8 Char" style:family="text">
      <style:text-properties style:font-name="Liberation Sans" fo:font-size="11pt" fo:font-style="italic" style:font-name-asian="Liberation Sans1" style:font-size-asian="11pt" style:font-style-asian="italic" style:font-name-complex="Liberation Sans1" style:font-size-complex="11pt" style:font-style-complex="italic"/>
    </style:style>
    <style:style style:name="Heading_20_9_20_Char" style:display-name="Heading 9 Char" style:family="text">
      <style:text-properties style:font-name="Liberation Sans" fo:font-size="10.5pt" fo:font-style="italic" style:font-name-asian="Liberation Sans1" style:font-size-asian="10.5pt" style:font-style-asian="italic" style:font-name-complex="Liberation Sans1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>
      <style:text-properties fo:color="#00a2ff" fo:font-size="9pt" fo:font-weight="bold" style:font-size-asian="9pt" style:font-weight-asian="bold" style:font-size-complex="9pt" style:font-weight-complex="bold"/>
    </style:style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Название_20_объекта_20_Знак" style:display-name="Название объекта Знак" style:family="text">
      <style:text-properties fo:color="#00a2ff" fo:font-size="9pt" fo:font-weight="bold" style:font-size-asian="9pt" style:font-weight-asian="bold" style:font-size-complex="9pt" style:font-weight-complex="bold"/>
    </style:style>
    <style:style style:name="Заголовок_20_1_20_Знак" style:display-name="Заголовок 1 Знак" style:family="text">
      <style:text-properties fo:color="#0079bf" style:font-name="Arial1" fo:font-size="20pt" style:font-name-asian="Arial2" style:font-size-asian="20pt" style:font-name-complex="Arial2" style:font-size-complex="20pt"/>
    </style:style>
    <style:style style:name="Заголовок_20_2_20_Знак" style:display-name="Заголовок 2 Знак" style:family="text">
      <style:text-properties fo:color="#0079bf" style:font-name="Arial1" fo:font-size="16pt" style:font-name-asian="Arial2" style:font-size-asian="16pt" style:font-name-complex="Arial2" style:font-size-complex="16pt"/>
    </style:style>
    <style:style style:name="Заголовок_20_3_20_Знак" style:display-name="Заголовок 3 Знак" style:family="text">
      <style:text-properties fo:color="#0079bf" style:font-name="Arial1" fo:font-size="14pt" style:font-name-asian="Arial2" style:font-size-asian="14pt" style:font-name-complex="Arial2" style:font-size-complex="14pt"/>
    </style:style>
    <style:style style:name="Заголовок_20_4_20_Знак" style:display-name="Заголовок 4 Знак" style:family="text">
      <style:text-properties fo:color="#0079bf" style:font-name="Arial1" fo:font-style="italic" style:font-name-asian="Arial2" style:font-style-asian="italic" style:font-name-complex="Arial2" style:font-style-complex="italic"/>
    </style:style>
    <style:style style:name="Заголовок_20_5_20_Знак" style:display-name="Заголовок 5 Знак" style:family="text">
      <style:text-properties fo:color="#0079bf" style:font-name="Arial1" style:font-name-asian="Arial2" style:font-name-complex="Arial2"/>
    </style:style>
    <style:style style:name="Заголовок_20_6_20_Знак" style:display-name="Заголовок 6 Знак" style:family="text">
      <style:text-properties fo:color="#595959" style:font-name="Arial1" fo:font-style="italic" style:font-name-asian="Arial2" style:font-style-asian="italic" style:font-name-complex="Arial2" style:font-style-complex="italic"/>
    </style:style>
    <style:style style:name="Заголовок_20_7_20_Знак" style:display-name="Заголовок 7 Знак" style:family="text">
      <style:text-properties fo:color="#595959" style:font-name="Arial1" style:font-name-asian="Arial2" style:font-name-complex="Arial2"/>
    </style:style>
    <style:style style:name="Заголовок_20_8_20_Знак" style:display-name="Заголовок 8 Знак" style:family="text">
      <style:text-properties fo:color="#272727" style:font-name="Arial1" fo:font-style="italic" style:font-name-asian="Arial2" style:font-style-asian="italic" style:font-name-complex="Arial2" style:font-style-complex="italic"/>
    </style:style>
    <style:style style:name="Заголовок_20_9_20_Знак" style:display-name="Заголовок 9 Знак" style:family="text">
      <style:text-properties fo:color="#272727" style:font-name="Arial1" fo:font-style="italic" style:font-name-asian="Arial2" style:font-style-asian="italic" style:font-name-complex="Arial2" style:font-style-complex="italic"/>
    </style:style>
    <style:style style:name="Название_20_Знак" style:display-name="Название Знак" style:family="text">
      <style:text-properties style:font-name="Arial1" fo:font-size="28pt" fo:letter-spacing="-0.018cm" style:font-name-asian="Arial2" style:font-size-asian="28pt" style:font-name-complex="Arial2" style:font-size-complex="28pt"/>
    </style:style>
    <style:style style:name="Подзаголовок_20_Знак" style:display-name="Подзаголовок Знак" style:family="text">
      <style:text-properties fo:color="#595959" fo:font-size="14pt" fo:letter-spacing="0.026cm" style:font-size-asian="14pt" style:font-size-complex="14pt"/>
    </style:style>
    <style:style style:name="Цитата_20_2_20_Знак" style:display-name="Цитата 2 Знак" style:family="text">
      <style:text-properties fo:color="#404040" fo:font-style="italic" style:font-style-asian="italic" style:font-style-complex="italic"/>
    </style:style>
    <style:style style:name="Выделенная_20_цитата_20_Знак" style:display-name="Выделенная цитата Знак" style:family="text">
      <style:text-properties fo:color="#0079bf" fo:font-style="italic" style:font-style-asian="italic" style:font-style-complex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 style:font-size-complex="10pt"/>
    </style:style>
    <style:style style:name="Placeholder_20_Text" style:display-name="Placeholder Text" style:family="text">
      <style:text-properties fo:color="#666666"/>
    </style:style>
    <style:style style:name="Верхний_20_колонтитул_20_Знак1" style:display-name="Верхний колонтитул Знак1" style:family="text">
      <style:text-properties fo:font-size="12pt" fo:language="en" fo:country="US" style:font-size-asian="12pt" style:language-asian="en" style:country-asian="US" style:font-size-complex="12pt"/>
    </style:style>
    <style:style style:name="Нижний_20_колонтитул_20_Знак1" style:display-name="Нижний колонтитул Знак1" style:family="text">
      <style:text-properties fo:font-size="12pt" fo:language="en" fo:country="US" style:font-size-asian="12pt" style:language-asian="en" style:country-asian="US" style:font-size-complex="12pt"/>
    </style:style>
    <style:style style:name="ListLabel_20_1" style:display-name="ListLabel 1" style:family="text">
      <style:text-properties fo:font-variant="normal" fo:text-transform="none" style:text-line-through-style="none" style:text-position="0% 100%" fo:letter-spacing="normal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882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882cm" fo:margin-left="1.658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882cm" fo:margin-left="2.046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882cm" fo:margin-left="2.434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882cm" fo:margin-left="2.822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882cm" fo:margin-left="3.2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882cm" fo:margin-left="3.598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882cm" fo:margin-left="3.986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882cm" fo:margin-left="4.3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882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882cm" fo:margin-left="1.658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882cm" fo:margin-left="2.046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882cm" fo:margin-left="2.434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882cm" fo:margin-left="2.822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882cm" fo:margin-left="3.2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882cm" fo:margin-left="3.598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882cm" fo:margin-left="3.986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882cm" fo:margin-left="4.3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1">
      <style:text-properties fo:language="ru" fo:country="RU"/>
    </style:style>
    <style:style style:name="MP2" style:family="paragraph" style:parent-style-name="Standard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.501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муся</meta:initial-creator>
    <meta:editing-cycles>13</meta:editing-cycles>
    <meta:creation-date>2025-12-07T14:11:00</meta:creation-date>
    <dc:date>2026-01-13T19:25:10</dc:date>
    <meta:generator>OpenOffice/4.1.7$Unix OpenOffice.org_project/417m1$Build-9800</meta:generator>
    <meta:printed-by>Олег Олег</meta:printed-by>
    <meta:print-date>2026-01-11T14:02:18</meta:print-date>
    <meta:document-statistic meta:table-count="3" meta:image-count="0" meta:object-count="0" meta:page-count="3" meta:paragraph-count="111" meta:word-count="757" meta:character-count="6424"/>
    <dc:creator>Олег Олег</dc:creator>
    <meta:user-defined meta:name="Company">gypno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786432</meta:user-defined>
    <meta:template xlink:type="simple" xlink:actuate="onRequest" xlink:title="Normal.dotm" xlink:href=""/>
  </office:meta>
</office:document-meta>
</file>